
<file path=META-INF/manifest.xml><?xml version="1.0" encoding="utf-8"?>
<manifest:manifest xmlns:manifest="urn:oasis:names:tc:opendocument:xmlns:manifest:1.0">
  <manifest:file-entry manifest:full-path="Object 1/" manifest:media-type="application/vnd.oasis.opendocument.formula"/>
  <manifest:file-entry manifest:full-path="/" manifest:media-type="application/vnd.oasis.opendocument.text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text-indent="0in"/>
      <style:text-properties fo:language="ru" fo:country="RU"/>
    </style:style>
    <style:style style:name="P2" style:parent-style-name="Textbody" style:family="paragraph">
      <style:paragraph-properties fo:text-align="center" fo:text-indent="0in"/>
      <style:text-properties fo:language="ru" fo:country="RU"/>
    </style:style>
    <style:style style:name="P3" style:parent-style-name="Textbody" style:family="paragraph">
      <style:paragraph-properties fo:text-align="center" fo:text-indent="0in"/>
      <style:text-properties fo:language="ru" fo:country="RU"/>
    </style:style>
    <style:style style:name="P4" style:parent-style-name="Textbody" style:family="paragraph">
      <style:paragraph-properties fo:text-align="center" fo:text-indent="0in"/>
      <style:text-properties fo:language="ru" fo:country="RU"/>
    </style:style>
    <style:style style:name="P5" style:parent-style-name="Textbody" style:family="paragraph">
      <style:paragraph-properties fo:text-align="center" fo:text-indent="0in"/>
      <style:text-properties fo:language="ru" fo:country="RU"/>
    </style:style>
    <style:style style:name="P6" style:parent-style-name="Textbody" style:family="paragraph">
      <style:paragraph-properties fo:text-align="center" fo:text-indent="0in"/>
      <style:text-properties fo:language="ru" fo:country="RU"/>
    </style:style>
    <style:style style:name="P7" style:parent-style-name="Textbody" style:family="paragraph">
      <style:paragraph-properties fo:text-align="center" fo:text-indent="0in"/>
      <style:text-properties fo:language="ru" fo:country="RU"/>
    </style:style>
    <style:style style:name="P8" style:parent-style-name="Textbody" style:family="paragraph">
      <style:paragraph-properties fo:text-align="center" fo:text-indent="0in"/>
      <style:text-properties fo:language="ru" fo:country="RU"/>
    </style:style>
    <style:style style:name="P9" style:parent-style-name="Textbody" style:family="paragraph">
      <style:paragraph-properties fo:text-align="center" fo:text-indent="0in"/>
      <style:text-properties fo:language="ru" fo:country="RU"/>
    </style:style>
    <style:style style:name="P10" style:parent-style-name="Textbody" style:family="paragraph">
      <style:paragraph-properties fo:text-align="end" fo:text-indent="0in"/>
      <style:text-properties fo:language="ru" fo:country="RU"/>
    </style:style>
    <style:style style:name="P11" style:parent-style-name="Textbody" style:family="paragraph">
      <style:paragraph-properties fo:text-align="end" fo:text-indent="0in"/>
      <style:text-properties fo:language="ru" fo:country="RU"/>
    </style:style>
    <style:style style:name="P12" style:parent-style-name="Textbody" style:family="paragraph">
      <style:paragraph-properties fo:text-align="end" fo:text-indent="0in"/>
      <style:text-properties fo:language="ru" fo:country="RU"/>
    </style:style>
    <style:style style:name="P13" style:parent-style-name="Textbody" style:family="paragraph">
      <style:paragraph-properties fo:text-align="end" fo:text-indent="0in"/>
      <style:text-properties fo:language="ru" fo:country="RU"/>
    </style:style>
    <style:style style:name="P14" style:parent-style-name="Textbody" style:family="paragraph">
      <style:paragraph-properties fo:text-align="end" fo:text-indent="0in"/>
      <style:text-properties fo:language="ru" fo:country="RU"/>
    </style:style>
    <style:style style:name="P15" style:parent-style-name="Textbody" style:family="paragraph">
      <style:paragraph-properties fo:text-align="end" fo:text-indent="0in"/>
      <style:text-properties fo:language="ru" fo:country="RU"/>
    </style:style>
    <style:style style:name="P16" style:parent-style-name="Textbody" style:family="paragraph">
      <style:paragraph-properties fo:text-align="end" fo:text-indent="0in"/>
      <style:text-properties fo:language="ru" fo:country="RU"/>
    </style:style>
    <style:style style:name="P17" style:parent-style-name="Textbody" style:family="paragraph">
      <style:paragraph-properties fo:text-align="end" fo:text-indent="0in"/>
      <style:text-properties fo:language="ru" fo:country="RU"/>
    </style:style>
    <style:style style:name="P18" style:parent-style-name="Textbody" style:family="paragraph">
      <style:paragraph-properties fo:text-align="end" fo:text-indent="0in"/>
      <style:text-properties fo:language="ru" fo:country="RU"/>
    </style:style>
    <style:style style:name="P19" style:parent-style-name="Textbody" style:family="paragraph">
      <style:paragraph-properties fo:text-align="end" fo:text-indent="0in"/>
      <style:text-properties fo:language="ru" fo:country="RU"/>
    </style:style>
    <style:style style:name="P20" style:parent-style-name="Textbody" style:family="paragraph">
      <style:paragraph-properties fo:text-align="end" fo:text-indent="0in"/>
      <style:text-properties fo:language="ru" fo:country="RU"/>
    </style:style>
    <style:style style:name="P21" style:parent-style-name="Textbody" style:family="paragraph">
      <style:paragraph-properties fo:text-align="end" fo:text-indent="0in"/>
      <style:text-properties fo:language="ru" fo:country="RU"/>
    </style:style>
    <style:style style:name="P22" style:parent-style-name="Textbody" style:family="paragraph">
      <style:paragraph-properties fo:text-align="end" fo:text-indent="0in"/>
      <style:text-properties fo:language="ru" fo:country="RU"/>
    </style:style>
    <style:style style:name="P23" style:parent-style-name="Textbody" style:family="paragraph">
      <style:paragraph-properties fo:text-align="end" fo:text-indent="0in"/>
      <style:text-properties fo:language="ru" fo:country="RU"/>
    </style:style>
    <style:style style:name="P24" style:parent-style-name="Textbody" style:family="paragraph">
      <style:paragraph-properties fo:text-align="end" fo:text-indent="0in"/>
      <style:text-properties fo:language="ru" fo:country="RU"/>
    </style:style>
    <style:style style:name="P25" style:parent-style-name="Textbody" style:family="paragraph">
      <style:paragraph-properties fo:text-align="end" fo:text-indent="0in"/>
      <style:text-properties fo:language="ru" fo:country="RU"/>
    </style:style>
    <style:style style:name="P26" style:parent-style-name="Textbody" style:family="paragraph">
      <style:paragraph-properties fo:text-align="end" fo:text-indent="0in"/>
      <style:text-properties fo:language="ru" fo:country="RU"/>
    </style:style>
    <style:style style:name="P27" style:parent-style-name="Textbody" style:family="paragraph">
      <style:paragraph-properties fo:text-align="end" fo:text-indent="0in"/>
      <style:text-properties fo:language="ru" fo:country="RU"/>
    </style:style>
    <style:style style:name="P28" style:parent-style-name="Textbody" style:family="paragraph">
      <style:paragraph-properties fo:text-align="end" fo:text-indent="0in"/>
      <style:text-properties fo:language="ru" fo:country="RU"/>
    </style:style>
    <style:style style:name="P29" style:parent-style-name="Textbody" style:family="paragraph">
      <style:paragraph-properties fo:text-align="center" fo:text-indent="0in"/>
      <style:text-properties fo:language="ru" fo:country="RU"/>
    </style:style>
    <style:style style:name="P30" style:parent-style-name="ContentsHeading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T31" style:parent-style-name="Основнойшрифтабзаца" style:family="text">
      <style:text-properties fo:language="ru" fo:country="RU"/>
    </style:style>
    <style:style style:name="P32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3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4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35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36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37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38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39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40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41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42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43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44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45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46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47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48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49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0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51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52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53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4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63" style:parent-style-name="Heading1withoutnumber" style:family="paragraph">
      <style:text-properties fo:language="ru" fo:country="RU"/>
    </style:style>
    <style:style style:name="P64" style:parent-style-name="Textbody" style:family="paragraph">
      <style:text-properties fo:language="ru" fo:country="RU"/>
    </style:style>
    <style:style style:name="P65" style:parent-style-name="Textbody" style:family="paragraph">
      <style:text-properties fo:language="ru" fo:country="RU"/>
    </style:style>
    <style:style style:name="P66" style:parent-style-name="Textbody" style:family="paragraph">
      <style:text-properties fo:language="ru" fo:country="RU"/>
    </style:style>
    <style:style style:name="P67" style:parent-style-name="Textbody" style:family="paragraph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P73" style:parent-style-name="Textbody" style:family="paragraph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P78" style:parent-style-name="Textbody" style:family="paragraph">
      <style:text-properties fo:language="ru" fo:country="RU"/>
    </style:style>
    <style:style style:name="P79" style:parent-style-name="Textbody" style:family="paragraph">
      <style:text-properties fo:language="ru" fo:country="RU"/>
    </style:style>
    <style:style style:name="P80" style:parent-style-name="Textbody" style:family="paragraph">
      <style:text-properties fo:language="ru" fo:country="RU"/>
    </style:style>
    <style:style style:name="P81" style:parent-style-name="Textbody" style:family="paragraph">
      <style:text-properties fo:language="ru" fo:country="RU"/>
    </style:style>
    <style:style style:name="P82" style:parent-style-name="Textbody" style:family="paragraph">
      <style:text-properties fo:language="ru" fo:country="RU"/>
    </style:style>
    <style:style style:name="P83" style:parent-style-name="Textbody" style:family="paragraph">
      <style:text-properties fo:language="ru" fo:country="RU"/>
    </style:style>
    <style:style style:name="P84" style:parent-style-name="Textbody" style:family="paragraph">
      <style:text-properties fo:language="ru" fo:country="RU"/>
    </style:style>
    <style:style style:name="P85" style:parent-style-name="Textbody" style:family="paragraph">
      <style:text-properties fo:language="ru" fo:country="RU"/>
    </style:style>
    <style:style style:name="P86" style:parent-style-name="Textbody" style:family="paragraph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P90" style:parent-style-name="Textbody" style:family="paragraph">
      <style:text-properties fo:language="ru" fo:country="RU"/>
    </style:style>
    <style:style style:name="P91" style:parent-style-name="Textbody" style:family="paragraph">
      <style:text-properties fo:language="ru" fo:country="RU"/>
    </style:style>
    <style:style style:name="P92" style:parent-style-name="Textbody" style:family="paragraph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P95" style:parent-style-name="Textbody" style:family="paragraph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P97" style:parent-style-name="Textbody" style:family="paragraph">
      <style:text-properties fo:language="ru" fo:country="RU"/>
    </style:style>
    <style:style style:name="P98" style:parent-style-name="Textbody" style:family="paragraph">
      <style:text-properties fo:language="ru" fo:country="RU"/>
    </style:style>
    <style:style style:name="P99" style:parent-style-name="Textbody" style:family="paragraph">
      <style:text-properties fo:language="ru" fo:country="RU"/>
    </style:style>
    <style:style style:name="P100" style:parent-style-name="Textbody" style:family="paragraph">
      <style:text-properties fo:language="ru" fo:country="RU"/>
    </style:style>
    <style:style style:name="P101" style:parent-style-name="Textbody" style:family="paragraph">
      <style:text-properties fo:language="ru" fo:country="RU"/>
    </style:style>
    <style:style style:name="P102" style:parent-style-name="Textbody" style:family="paragraph">
      <style:text-properties fo:language="ru" fo:country="RU"/>
    </style:style>
    <style:style style:name="P103" style:parent-style-name="Textbody" style:family="paragraph">
      <style:text-properties fo:language="ru" fo:country="RU"/>
    </style:style>
    <style:style style:name="P104" style:parent-style-name="Textbody" style:family="paragraph">
      <style:text-properties fo:language="ru" fo:country="RU"/>
    </style:style>
    <style:style style:name="P105" style:parent-style-name="Textbody" style:family="paragraph">
      <style:text-properties fo:language="ru" fo:country="RU"/>
    </style:style>
    <style:style style:name="P106" style:parent-style-name="Textbody" style:family="paragraph">
      <style:text-properties fo:language="ru" fo:country="RU"/>
    </style:style>
    <style:style style:name="P107" style:parent-style-name="Textbody" style:family="paragraph">
      <style:text-properties fo:language="ru" fo:country="RU"/>
    </style:style>
    <style:style style:name="P108" style:parent-style-name="Textbody" style:family="paragraph">
      <style:text-properties fo:language="ru" fo:country="RU"/>
    </style:style>
    <style:style style:name="P109" style:parent-style-name="Textbody" style:family="paragraph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P112" style:parent-style-name="Textbody" style:family="paragraph">
      <style:text-properties fo:language="ru" fo:country="RU"/>
    </style:style>
    <style:style style:name="T11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P125" style:parent-style-name="Textbody" style:family="paragraph">
      <style:text-properties fo:language="ru" fo:country="RU"/>
    </style:style>
    <style:style style:name="TableColumn127" style:family="table-column">
      <style:table-column-properties style:column-width="1.6736in" style:use-optimal-column-width="false"/>
    </style:style>
    <style:style style:name="TableColumn128" style:family="table-column">
      <style:table-column-properties style:column-width="1.6736in" style:use-optimal-column-width="false"/>
    </style:style>
    <style:style style:name="TableColumn129" style:family="table-column">
      <style:table-column-properties style:column-width="1.6729in" style:use-optimal-column-width="false"/>
    </style:style>
    <style:style style:name="TableColumn130" style:family="table-column">
      <style:table-column-properties style:column-width="1.6729in" style:use-optimal-column-width="false"/>
    </style:style>
    <style:style style:name="Table126" style:family="table">
      <style:table-properties style:width="6.693in" fo:margin-left="0.0312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P133" style:parent-style-name="TableContents" style:family="paragraph">
      <style:text-properties fo:language="ru" fo:country="RU"/>
    </style:style>
    <style:style style:name="TableCell134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P135" style:parent-style-name="TableContents" style:family="paragraph">
      <style:text-properties fo:language="ru" fo:country="RU"/>
    </style:style>
    <style:style style:name="TableCell136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P137" style:parent-style-name="TableContents" style:family="paragraph">
      <style:text-properties fo:language="ru" fo:country="RU"/>
    </style:style>
    <style:style style:name="TableCell138" style:family="table-cell">
      <style:table-cell-properties fo:border="0.0069in solid #000000" fo:padding-top="0.0381in" fo:padding-left="0.0381in" fo:padding-bottom="0.0381in" fo:padding-right="0.0381in"/>
    </style:style>
    <style:style style:name="P139" style:parent-style-name="TableContents" style:family="paragraph">
      <style:text-properties fo:language="ru" fo:country="RU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42" style:parent-style-name="TableContents" style:family="paragraph">
      <style:text-properties fo:language="ru" fo:country="RU"/>
    </style:style>
    <style:style style:name="TableCell143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44" style:parent-style-name="TableContents" style:family="paragraph">
      <style:text-properties fo:language="ru" fo:country="RU"/>
    </style:style>
    <style:style style:name="TableCell14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46" style:parent-style-name="TableContents" style:family="paragraph">
      <style:text-properties fo:language="ru" fo:country="RU"/>
    </style:style>
    <style:style style:name="TableCell147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148" style:parent-style-name="TableContents" style:family="paragraph">
      <style:text-properties fo:language="ru" fo:country="RU"/>
    </style:style>
    <style:style style:name="P149" style:parent-style-name="Textbody" style:family="paragraph">
      <style:text-properties fo:language="ru" fo:country="RU"/>
    </style:style>
    <style:style style:name="P150" style:parent-style-name="Tableparagraph" style:family="paragraph">
      <style:text-properties fo:language="ru" fo:country="RU"/>
    </style:style>
    <style:style style:name="TableColumn152" style:family="table-column">
      <style:table-column-properties style:column-width="3.3465in" style:use-optimal-column-width="false"/>
    </style:style>
    <style:style style:name="TableColumn153" style:family="table-column">
      <style:table-column-properties style:column-width="3.3465in" style:use-optimal-column-width="false"/>
    </style:style>
    <style:style style:name="Table151" style:family="table">
      <style:table-properties style:width="6.693in" fo:margin-left="0.0312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P156" style:parent-style-name="TableContents" style:family="paragraph">
      <style:text-properties fo:language="ru" fo:country="RU"/>
    </style:style>
    <style:style style:name="TableCell157" style:family="table-cell">
      <style:table-cell-properties fo:border="0.0069in solid #000000" fo:padding-top="0.0381in" fo:padding-left="0.0381in" fo:padding-bottom="0.0381in" fo:padding-right="0.0381in"/>
    </style:style>
    <style:style style:name="P158" style:parent-style-name="TableContents" style:family="paragraph">
      <style:text-properties fo:language="ru" fo:country="RU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61" style:parent-style-name="TableContents" style:family="paragraph">
      <style:text-properties fo:language="ru" fo:country="RU"/>
    </style:style>
    <style:style style:name="TableCell162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163" style:parent-style-name="TableContents" style:family="paragraph">
      <style:text-properties fo:language="ru" fo:country="RU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66" style:parent-style-name="TableContents" style:family="paragraph">
      <style:text-properties fo:language="ru" fo:country="RU"/>
    </style:style>
    <style:style style:name="TableCell167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168" style:parent-style-name="TableContents" style:family="paragraph">
      <style:text-properties fo:language="ru" fo:country="RU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text-properties fo:language="ru" fo:country="RU"/>
    </style:style>
    <style:style style:name="TableCell172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173" style:parent-style-name="TableContents" style:family="paragraph">
      <style:text-properties fo:language="ru" fo:country="RU"/>
    </style:style>
    <style:style style:name="P174" style:parent-style-name="Tableparagraph" style:family="paragraph">
      <style:text-properties fo:language="ru" fo:country="RU"/>
    </style:style>
    <style:style style:name="P175" style:parent-style-name="Tableparagraph" style:family="paragraph">
      <style:text-properties fo:language="ru" fo:country="RU"/>
    </style:style>
    <style:style style:name="P176" style:parent-style-name="Heading1withoutnumber" style:family="paragraph">
      <style:text-properties fo:language="ru" fo:country="RU"/>
    </style:style>
    <style:style style:name="T177" style:parent-style-name="Основнойшрифтабзаца" style:family="text">
      <style:text-properties fo:language="ru" fo:country="RU"/>
    </style:style>
    <style:style style:name="T178" style:parent-style-name="Основнойшрифтабзаца" style:family="text">
      <style:text-properties fo:language="ru" fo:country="RU"/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Мсоковский физико-технический институт.</text:p>
      <text:p text:style-name="P2"/>
      <text:p text:style-name="P3"/>
      <text:p text:style-name="P4"/>
      <text:p text:style-name="P5"/>
      <text:p text:style-name="P6"/>
      <text:p text:style-name="P7"/>
      <text:p text:style-name="P8">РЕФЕРАТ</text:p>
      <text:p text:style-name="P9">Профессия инженер-исследователь.</text:p>
      <text:p text:style-name="P10"/>
      <text:p text:style-name="P11"/>
      <text:p text:style-name="P12"/>
      <text:p text:style-name="P13">Павлов<text:s/>Дмитрий, Б01-505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МФТИ<text:s/>2026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0"><text:span text:style-name="T31">Содержание</text:span></text:p>
          <text:p text:style-name="P32"><text:a xlink:href="#__RefHeading___Toc356_2003441714" office:target-frame-name="_top" xlink:show="replace">ВВЕДЕНИЕ<text:tab/>4</text:a></text:p>
          <text:p text:style-name="P33"><text:a xlink:href="#__RefHeading___Toc15_2003441714" office:target-frame-name="_top" xlink:show="replace">1 Основные направления деятельности<text:tab/>5</text:a></text:p>
          <text:p text:style-name="P34"><text:a xlink:href="#__RefHeading___Toc17_2003441714" office:target-frame-name="_top" xlink:show="replace">1.1 Экспериментальные исследования<text:tab/>5</text:a></text:p>
          <text:p text:style-name="P35"><text:a xlink:href="#__RefHeading___Toc19_2003441714" office:target-frame-name="_top" xlink:show="replace">1.1.1 Разработка и проведение экспериментов<text:tab/>5</text:a></text:p>
          <text:p text:style-name="P36"><text:a xlink:href="#__RefHeading___Toc21_2003441714" office:target-frame-name="_top" xlink:show="replace">1.1.2 Сбор данных<text:tab/>5</text:a></text:p>
          <text:p text:style-name="P37"><text:a xlink:href="#__RefHeading___Toc23_2003441714" office:target-frame-name="_top" xlink:show="replace">1.2 Анализ данных<text:tab/>5</text:a></text:p>
          <text:p text:style-name="P38"><text:a xlink:href="#__RefHeading___Toc25_2003441714" office:target-frame-name="_top" xlink:show="replace">1.2.1 Обработка и интерпретация полученных данных<text:tab/>5</text:a></text:p>
          <text:p text:style-name="P39"><text:a xlink:href="#__RefHeading___Toc27_2003441714" office:target-frame-name="_top" xlink:show="replace">1.2.2 Применение методов моделирования и симуляции<text:tab/>5</text:a></text:p>
          <text:p text:style-name="P40"><text:a xlink:href="#__RefHeading___Toc29_2003441714" office:target-frame-name="_top" xlink:show="replace">1.3 Разработка и тестирование прототипов<text:tab/>5</text:a></text:p>
          <text:p text:style-name="P41"><text:a xlink:href="#__RefHeading___Toc31_2003441714" office:target-frame-name="_top" xlink:show="replace">1.3.1 Создание прототипов<text:tab/>5</text:a></text:p>
          <text:p text:style-name="P42"><text:a xlink:href="#__RefHeading___Toc33_2003441714" office:target-frame-name="_top" xlink:show="replace">1.3.2 Тестирование прототипов<text:tab/>6</text:a></text:p>
          <text:p text:style-name="P43"><text:a xlink:href="#__RefHeading___Toc35_2003441714" office:target-frame-name="_top" xlink:show="replace">1.3.3 Подготовка отчётов и презентаций<text:tab/>6</text:a></text:p>
          <text:p text:style-name="P44"><text:a xlink:href="#__RefHeading___Toc37_2003441714" office:target-frame-name="_top" xlink:show="replace">1.3.4 Оформление результатов исследований<text:tab/>6</text:a></text:p>
          <text:p text:style-name="P45"><text:a xlink:href="#__RefHeading___Toc39_2003441714" office:target-frame-name="_top" xlink:show="replace">1.3.5 Публикация результатов<text:tab/>6</text:a></text:p>
          <text:p text:style-name="P46"><text:a xlink:href="#__RefHeading___Toc41_2003441714" office:target-frame-name="_top" xlink:show="replace">1.4 Сотрудничество<text:tab/>6</text:a></text:p>
          <text:p text:style-name="P47"><text:a xlink:href="#__RefHeading___Toc43_2003441714" office:target-frame-name="_top" xlink:show="replace">1.4.1 Работа в команде<text:tab/>6</text:a></text:p>
          <text:p text:style-name="P48"><text:a xlink:href="#__RefHeading___Toc45_2003441714" office:target-frame-name="_top" xlink:show="replace">1.4.2 Участие в междисциплинарных проектах<text:tab/>6</text:a></text:p>
          <text:p text:style-name="P49"><text:a xlink:href="#__RefHeading___Toc86_2003441714" office:target-frame-name="_top" xlink:show="replace">2 Ключевые компетенции специалиста<text:tab/>7</text:a></text:p>
          <text:p text:style-name="P50"><text:a xlink:href="#__RefHeading___Toc88_2003441714" office:target-frame-name="_top" xlink:show="replace">2.1 Технические навыки<text:tab/>7</text:a></text:p>
          <text:p text:style-name="P51"><text:a xlink:href="#__RefHeading___Toc90_2003441714" office:target-frame-name="_top" xlink:show="replace">2.2 Личностные качества<text:tab/>7</text:a></text:p>
          <text:p text:style-name="P52"><text:a xlink:href="#__RefHeading___Toc1627_2003441714" office:target-frame-name="_top" xlink:show="replace">2.3 Профессионализм<text:tab/>7</text:a></text:p>
          <text:p text:style-name="P53"><text:a xlink:href="#__RefHeading___Toc92_2003441714" office:target-frame-name="_top" xlink:show="replace">3 Сферы применения<text:tab/>8</text:a></text:p>
          <text:p text:style-name="P54"><text:a xlink:href="#__RefHeading___Toc94_2003441714" office:target-frame-name="_top" xlink:show="replace">3.1 <text:s/>Роль в современном бизнесе<text:tab/>8</text:a></text:p>
          <text:p text:style-name="P55"><text:a xlink:href="#__RefHeading___Toc96_2003441714" office:target-frame-name="_top" xlink:show="replace">3.2 <text:s/>Перспективы развития<text:tab/>8</text:a></text:p>
          <text:p text:style-name="P56"><text:a xlink:href="#__RefHeading___Toc98_2003441714" office:target-frame-name="_top" xlink:show="replace">4 Требования к образованию<text:tab/>9</text:a></text:p>
          <text:p text:style-name="P57"><text:a xlink:href="#__RefHeading___Toc1629_2003441714" office:target-frame-name="_top" xlink:show="replace">5 Примеры из жизни<text:tab/>10</text:a></text:p>
          <text:p text:style-name="P58"><text:a xlink:href="#__RefHeading___Toc1631_2003441714" office:target-frame-name="_top" xlink:show="replace">5.1 Организации<text:tab/>10</text:a></text:p>
          <text:p text:style-name="P59"><text:a xlink:href="#__RefHeading___Toc1633_2003441714" office:target-frame-name="_top" xlink:show="replace">5.2 Люди<text:tab/>10</text:a></text:p>
          <text:p text:style-name="P60"><text:a xlink:href="#__RefHeading___Toc1635_2003441714" office:target-frame-name="_top" xlink:show="replace">6 Таблицы<text:tab/>11</text:a></text:p>
          <text:p text:style-name="P61"><text:a xlink:href="#__RefHeading___Toc100_2003441714" office:target-frame-name="_top" xlink:show="replace"><text:s/>ЗАКЛЮЧЕНИЕ<text:tab/>12</text:a></text:p>
        </text:index-body>
      </text:table-of-content>
      <text:p text:style-name="P62"/>
      <text:p text:style-name="Textbody"/>
      <text:p text:style-name="P63"><text:bookmark-start text:name="__RefHeading___Toc356_2003441714"/><text:soft-page-break/>ВВЕДЕНИЕ<text:bookmark-end text:name="__RefHeading___Toc356_2003441714"/></text:p>
      <text:p text:style-name="P64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1" text:outline-level="1"><text:bookmark-start text:name="__RefHeading___Toc15_2003441714"/><text:soft-page-break/>Основные направления деятельности<text:bookmark-end text:name="__RefHeading___Toc15_2003441714"/></text:h>
      <text:p text:style-name="P65">Инженер-исследователь осуществляет свою деятельность в нескольких ключевых направлениях, каждое из которых требует глубоких знаний и<text:s/>специализированных навыков.</text:p>
      <text:h text:style-name="Heading2" text:outline-level="2"><text:bookmark-start text:name="__RefHeading___Toc17_2003441714"/>Экспериментальные исследования<text:bookmark-end text:name="__RefHeading___Toc17_2003441714"/></text:h>
      <text:h text:style-name="Heading3" text:outline-level="3"><text:bookmark-start text:name="__RefHeading___Toc19_2003441714"/>Разработка и проведение экспериментов<text:bookmark-end text:name="__RefHeading___Toc19_2003441714"/></text:h>
      <text:p text:style-name="P66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3" text:outline-level="3"><text:bookmark-start text:name="__RefHeading___Toc21_2003441714"/>Сбор данных<text:bookmark-end text:name="__RefHeading___Toc21_2003441714"/></text:h>
      <text:p text:style-name="P67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2" text:outline-level="2"><text:bookmark-start text:name="__RefHeading___Toc23_2003441714"/>Анализ данных<text:bookmark-end text:name="__RefHeading___Toc23_2003441714"/></text:h>
      <text:h text:style-name="Heading3" text:outline-level="3"><text:bookmark-start text:name="__RefHeading___Toc25_2003441714"/>Обработка и<text:s/>интерпретация полученных данных<text:bookmark-end text:name="__RefHeading___Toc25_2003441714"/></text:h>
      <text:p text:style-name="Textbody"><text:span text:style-name="T68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</text:span><text:span text:style-name="T69">,<text:s/></text:span>MATLAB<text:span text:style-name="T70">,<text:s/></text:span>Python<text:span text:style-name="T71">,<text:s/></text:span>R<text:span text:style-name="T72">).</text:span></text:p>
      <text:h text:style-name="Heading3" text:outline-level="3"><text:bookmark-start text:name="__RefHeading___Toc27_2003441714"/>Применение методов моделирования и симуляции<text:bookmark-end text:name="__RefHeading___Toc27_2003441714"/></text:h>
      <text:p text:style-name="P73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<text:s/>оптимизировать процессы.</text:p>
      <text:h text:style-name="Heading2" text:outline-level="2"><text:bookmark-start text:name="__RefHeading___Toc29_2003441714"/>Разработка и тестирование прототипов<text:bookmark-end text:name="__RefHeading___Toc29_2003441714"/></text:h>
      <text:h text:style-name="Heading3" text:outline-level="3"><text:bookmark-start text:name="__RefHeading___Toc31_2003441714"/>Создание прототипов<text:bookmark-end text:name="__RefHeading___Toc31_2003441714"/></text:h>
      <text:p text:style-name="Textbody"><text:span text:style-name="T74">Самая важная задача инженера-исследователя - создавать новые продукты или технологии на основе результатов исследований. Это может быть<text:s/></text:span><text:soft-page-break/><text:span text:style-name="T75">как физическое моделирование, так и ви</text:span><text:span text:style-name="T76">ртуальное прототипирование с использованием<text:s/></text:span>CAD<text:span text:style-name="T77">-программ.</text:span></text:p>
      <text:h text:style-name="Heading3" text:outline-level="3"><text:bookmark-start text:name="__RefHeading___Toc33_2003441714"/>Тестирование прототипов<text:bookmark-end text:name="__RefHeading___Toc33_2003441714"/></text:h>
      <text:p text:style-name="P78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3" text:outline-level="3"><text:bookmark-start text:name="__RefHeading___Toc35_2003441714"/>Подготовка отчётов и презентаций<text:bookmark-end text:name="__RefHeading___Toc35_2003441714"/></text:h>
      <text:h text:style-name="Heading3" text:outline-level="3"><text:bookmark-start text:name="__RefHeading___Toc37_2003441714"/>Оформление результатов исследований<text:bookmark-end text:name="__RefHeading___Toc37_2003441714"/></text:h>
      <text:p text:style-name="P79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3" text:outline-level="3"><text:bookmark-start text:name="__RefHeading___Toc39_2003441714"/>Публикация результатов<text:bookmark-end text:name="__RefHeading___Toc39_2003441714"/></text:h>
      <text:p text:style-name="P80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2" text:outline-level="2"><text:bookmark-start text:name="__RefHeading___Toc41_2003441714"/>Сотрудничество<text:bookmark-end text:name="__RefHeading___Toc41_2003441714"/></text:h>
      <text:h text:style-name="Heading3" text:outline-level="3"><text:bookmark-start text:name="__RefHeading___Toc43_2003441714"/>Работа<text:s/>в команде<text:bookmark-end text:name="__RefHeading___Toc43_2003441714"/></text:h>
      <text:p text:style-name="P81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p text:style-name="Textbody">...</text:p>
      <text:h text:style-name="Heading3" text:outline-level="3"><text:bookmark-start text:name="__RefHeading___Toc45_2003441714"/>Участие в<text:s/>междисциплинарных проектах<text:bookmark-end text:name="__RefHeading___Toc45_2003441714"/></text:h>
      <text:p text:style-name="P82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1" text:outline-level="1"><text:bookmark-start text:name="__RefHeading___Toc86_2003441714"/><text:soft-page-break/>Ключевые компетенции<text:s/>специалиста<text:bookmark-end text:name="__RefHeading___Toc86_2003441714"/></text:h>
      <text:h text:style-name="Heading2" text:outline-level="2"><text:bookmark-start text:name="__RefHeading___Toc88_2003441714"/>Технические навыки<text:bookmark-end text:name="__RefHeading___Toc88_2003441714"/></text:h>
      <text:p text:style-name="Textbody">- Глубокие знания в профильной области</text:p>
      <text:p text:style-name="Textbody">- Умение работать с современным оборудованием</text:p>
      <text:p text:style-name="P83">- Навыки программирования</text:p>
      <text:p text:style-name="P84">- Способность к математическому моделированию</text:p>
      <text:h text:style-name="Heading2" text:outline-level="2"><text:bookmark-start text:name="__RefHeading___Toc90_2003441714"/>Личностные качества<text:bookmark-end text:name="__RefHeading___Toc90_2003441714"/></text:h>
      <text:p text:style-name="Textbody">- Аналитическое мышление</text:p>
      <text:p text:style-name="P85">- Способность к критическому анализу</text:p>
      <text:p text:style-name="P86">- Гибкость мышления</text:p>
      <text:p text:style-name="Textbody">- Коммуникабельность</text:p>
      <text:p text:style-name="Textbody">- Стремление к постоянному обучению</text:p>
      <text:h text:style-name="Heading2" text:outline-level="2"><text:bookmark-start text:name="__RefHeading___Toc1627_2003441714"/>Профессионализм<text:bookmark-end text:name="__RefHeading___Toc1627_2003441714"/></text:h>
      <text:p text:style-name="Textbody"><text:span text:style-name="T87">Успешность и востребованность инженера-исследователя, как и специалиста в любой другой области, зависит не только от качества тренировки навыков.<text:s/></text:span>Профессионализм можно оценить следующей формулой:</text:p>
      <text:p text:style-name="Formulasparagraph"><text:tab/><draw:frame draw:style-name="a0" text:anchor-type="as-char" svg:x="0in" svg:y="0in" svg:width="0.64167in" svg:height="0.19167in" style:rel-width="scale" style:rel-height="scale"><draw:object xlink:href="Object 1/" xlink:type="simple" xlink:show="embed" xlink:actuate="onLoad"/></draw:frame><text:tab/>(1)</text:p>
      <text:p text:style-name="Textbody">где P (professionalism) — профессионализм , S (skills) — навыки, A (attitude) — отношение.<text:s/><text:span text:style-name="T88">Из формулы 1 следует, что мастер, работающий с равнодушием, и воодушевлённый новичок будут одинаково далеки о</text:span><text:span text:style-name="T89">т тех, с кем хочется иметь дело.</text:span></text:p>
      <text:p text:style-name="P90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1" text:outline-level="1"><text:bookmark-start text:name="__RefHeading___Toc92_2003441714"/><text:soft-page-break/>Сферы применения<text:bookmark-end text:name="__RefHeading___Toc92_2003441714"/></text:h>
      <text:p text:style-name="Textbody">Инженеры-исследователи востребованы в:</text:p>
      <text:p text:style-name="Textbody">- Машиностроении</text:p>
      <text:p text:style-name="Textbody">- Электронике</text:p>
      <text:p text:style-name="P91">- Энергетике</text:p>
      <text:p text:style-name="P92">- Биотехнологиях</text:p>
      <text:p text:style-name="Textbody"><text:span text:style-name="T93">-<text:s/></text:span>IT<text:span text:style-name="T94">-индустрии</text:span></text:p>
      <text:p text:style-name="P95">- Химической промышленности</text:p>
      <text:h text:style-name="Heading2" text:outline-level="2"><text:bookmark-start text:name="__RefHeading___Toc94_2003441714"/><text:span text:style-name="T96"><text:s/></text:span>Роль в современном бизнесе<text:bookmark-end text:name="__RefHeading___Toc94_2003441714"/></text:h>
      <text:p text:style-name="P97">Преимущества для компании:</text:p>
      <text:p text:style-name="P98">- Внедрение передовых технологий</text:p>
      <text:p text:style-name="P99">- Оптимизация производственных процессов</text:p>
      <text:p text:style-name="P100">- Разработка<text:s/>инновационных продуктов</text:p>
      <text:p text:style-name="Textbody">- Снижение затрат</text:p>
      <text:p text:style-name="Textbody">- Повышение конкурентоспособности</text:p>
      <text:h text:style-name="Heading2" text:outline-level="2"><text:bookmark-start text:name="__RefHeading___Toc96_2003441714"/><text:s/>Перспективы развития<text:bookmark-end text:name="__RefHeading___Toc96_2003441714"/></text:h>
      <text:p text:style-name="P101">Карьерный рост инженера-исследователя может включать:</text:p>
      <text:p text:style-name="P102">- Руководящие позиции в отделах исследований и разработок</text:p>
      <text:p text:style-name="Textbody">- Создание собственных исследовательских проектов</text:p>
      <text:p text:style-name="P103">- Переход в академическую сферу</text:p>
      <text:p text:style-name="P104">- Основание инновационных компаний</text:p>
      <text:h text:style-name="Heading1" text:outline-level="1"><text:bookmark-start text:name="__RefHeading___Toc98_2003441714"/><text:soft-page-break/>Требования к образованию<text:bookmark-end text:name="__RefHeading___Toc98_2003441714"/></text:h>
      <text:p text:style-name="P105">Для работы инженером-исследователем необходимо:</text:p>
      <text:p text:style-name="Textbody">- Высшее техническое образование</text:p>
      <text:p text:style-name="P106">- Магистратура или аспирантура</text:p>
      <text:p text:style-name="P107">- Практический опыт в выбранной области</text:p>
      <text:p text:style-name="Textbody">- Знание<text:s/>современных методов исследования</text:p>
      <text:p text:style-name="Textbody">- Владение специализированным программным обеспечением</text:p>
      <text:h text:style-name="Heading1" text:outline-level="1"><text:bookmark-start text:name="__RefHeading___Toc1629_2003441714"/><text:soft-page-break/>Примеры из жизни<text:bookmark-end text:name="__RefHeading___Toc1629_2003441714"/></text:h>
      <text:h text:style-name="Heading2" text:outline-level="2"><text:bookmark-start text:name="__RefHeading___Toc1631_2003441714"/>Организации<text:bookmark-end text:name="__RefHeading___Toc1631_2003441714"/></text:h>
      <text:p text:style-name="P108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P109"/>
      <text:p text:style-name="ImagesSignature"><text:span text:style-name="T110">Рисунок 1 – Лабораторный корпус МФТИ,</text:span> <text:span text:style-name="T111">Физтех</text:span></text:p>
      <text:h text:style-name="Heading2" text:outline-level="2"><text:bookmark-start text:name="__RefHeading___Toc1633_2003441714"/>Люди<text:bookmark-end text:name="__RefHeading___Toc1633_2003441714"/></text:h>
      <text:p text:style-name="P112">На рисунке 2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ImagesParagraph"><text:span text:style-name="T113"><draw:frame draw:style-name="a1" draw:name="Рисунок 2" text:anchor-type="as-char" svg:x="0in" svg:y="0in" svg:width="5.28803in" svg:height="2.97452in" style:rel-width="scale" style:rel-height="scale"><draw:image xlink:href="media/image1.jpeg" xlink:type="simple" xlink:show="embed" xlink:actuate="onLoad"/><svg:desc>841192914736.jpg</svg:desc></draw:frame></text:span></text:p>
      <text:p text:style-name="ImagesSignature"><text:span text:style-name="T114">Рисунок 2 – Дмитрий</text:span> <text:span text:style-name="T115">Тюлькин,</text:span><text:span text:style-name="T116"><text:line-break/></text:span><text:span text:style-name="T117">выпускник гимназии</text:span> <text:span text:style-name="T118">28 города Костромы</text:span><text:span text:style-name="T119"><text:line-break/></text:span><text:span text:style-name="T120">и студент</text:span> <text:span text:style-name="T121">первого</text:span> <text:span text:style-name="T122">курса</text:span> <text:span text:style-name="T123">МФТИ,</text:span> <text:span text:style-name="T124">Физтех</text:span></text:p>
      <text:h text:style-name="Heading1" text:outline-level="1"><text:bookmark-start text:name="__RefHeading___Toc1635_2003441714"/><text:soft-page-break/>Таблицы<text:bookmark-end text:name="__RefHeading___Toc1635_2003441714"/></text:h>
      <text:p text:style-name="P125">Таблица номер 1 идет до таблицы номер 2.</text:p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</table:table>
      <text:p text:style-name="P149"/>
      <text:p text:style-name="P150">Таблица номер 1. Она идет после предыдущей таблицы.</text:p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</table:table>
      <text:p text:style-name="P174"/>
      <text:p text:style-name="P175">Таблица номер<text:s/>2. Она идет после предыдущей таблицы.</text:p>
      <text:p text:style-name="P176"><text:bookmark-start text:name="__RefHeading___Toc100_2003441714"/><text:soft-page-break/><text:s/>ЗАКЛЮЧЕНИЕ<text:bookmark-end text:name="__RefHeading___Toc100_2003441714"/></text:p>
      <text:p text:style-name="Textbody"><text:span text:style-name="T177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</text:span><text:span text:style-name="T178">кий прогресс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break-before="page" fo:margin-top="0in" fo:margin-bottom="0in"/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in" fo:margin-bottom="0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text-align="justify" fo:line-height="150%" fo:text-indent="1.25in"/>
      <style:text-properties style:font-name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Arial Unicode MS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paragraph-properties fo:text-align="center" fo:text-indent="0in"/>
      <style:text-properties fo:hyphenate="false"/>
    </style:style>
    <style:style style:name="IndexHeading" style:display-name="Index Heading" style:family="paragraph" style:parent-style-name="Heading">
      <style:paragraph-properties text:number-lines="false" fo:text-indent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paragraph-properties fo:text-align="center"/>
      <style:text-properties fo:text-transform="uppercase" fo:hyphenate="false"/>
    </style:style>
    <style:style style:name="Contents1" style:display-name="Contents 1" style:family="paragraph" style:parent-style-name="Index">
      <style:paragraph-properties fo:text-indent="0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 fo:text-indent="0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Heading1withoutnumber" style:display-name="Heading 1 without number" style:family="paragraph" style:parent-style-name="Heading" style:next-style-name="Textbody" style:default-outline-level="1">
      <style:paragraph-properties fo:break-before="page" fo:text-align="center" fo:margin-top="0in" fo:margin-bottom="0in" fo:text-indent="0in"/>
      <style:text-properties fo:font-weight="bold" style:font-weight-asian="bold" fo:hyphenate="false"/>
    </style:style>
    <style:style style:name="ImagesParagraph" style:display-name="Images Paragraph" style:family="paragraph" style:parent-style-name="Textbody">
      <style:paragraph-properties fo:keep-with-next="always" fo:text-align="center" fo:margin-top="0.4902in" fo:text-indent="0in"/>
      <style:text-properties fo:hyphenate="false"/>
    </style:style>
    <style:style style:name="ImagesSignature" style:display-name="Images Signature" style:family="paragraph" style:parent-style-name="Textbody">
      <style:paragraph-properties fo:text-align="center" fo:line-height="100%" fo:text-indent="0in"/>
      <style:text-properties fo:hyphenate="false"/>
    </style:style>
    <style:style style:name="Formulasparagraph" style:display-name="Formulas paragraph" style:family="paragraph" style:parent-style-name="Textbody">
      <style:paragraph-properties fo:margin-top="0.4902in" fo:margin-bottom="0.4902in" fo:text-indent="0in">
        <style:tab-stops>
          <style:tab-stop style:type="right" style:position="3.1402in"/>
          <style:tab-stop style:type="right" style:position="6.6902in"/>
        </style:tab-stops>
      </style:paragraph-properties>
      <style:text-properties fo:hyphenate="false"/>
    </style:style>
    <style:style style:name="Tableparagraph" style:display-name="Table paragraph" style:family="paragraph" style:parent-style-name="Textbody">
      <style:paragraph-properties fo:text-align="center" fo:text-indent="0in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ima</meta:initial-creator>
    <dc:creator>Пользователь Windows</dc:creator>
    <meta:creation-date>2026-02-22T17:02:00Z</meta:creation-date>
    <dc:date>2026-04-07T08:02:00Z</dc:date>
    <meta:template xlink:href="Normal.dotm" xlink:type="simple"/>
    <meta:editing-cycles>1</meta:editing-cycles>
    <meta:editing-duration>PT3900S</meta:editing-duration>
    <meta:document-statistic meta:page-count="11" meta:paragraph-count="17" meta:word-count="1284" meta:character-count="8588" meta:row-count="61" meta:non-whitespace-character-count="7321"/>
  </office:meta>
</office:document-meta>
</file>

<file path=Object 1/content.xml><?xml version="1.0" encoding="utf-8"?>
<mml:math xmlns:mml="http://www.w3.org/1998/Math/MathML" xmlns:m="http://schemas.openxmlformats.org/officeDocument/2006/math">
  <mml:mi>P</mml:mi>
  <mml:mo>=</mml:mo>
  <mml:mi>S</mml:mi>
  <mml:mo>⋅</mml:mo>
  <mml:mi>A</mml:mi>
</mml:math>
</file>